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fill="solid" draw:fill-color="#ffffff" draw:textarea-horizontal-align="center" draw:textarea-vertical-align="middle" fo:padding-top="0.051cm" fo:padding-bottom="0.051cm" fo:padding-left="0.051cm" fo:padding-right="0.051cm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ccccc" draw:textarea-horizontal-align="center" draw:textarea-vertical-align="middle"/>
    </style:style>
    <style:style style:name="gr5" style:family="graphic" style:parent-style-name="standard">
      <style:graphic-properties draw:marker-end-width="0.3cm" draw:textarea-horizontal-align="center" draw:textarea-vertical-align="middle"/>
    </style:style>
    <style:style style:name="gr6" style:family="graphic" style:parent-style-name="standard">
      <style:graphic-properties draw:marker-start="Square_20_45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8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4cm" fo:min-width="8.0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9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9.842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9pt"/>
    </style:style>
    <style:style style:name="P3" style:family="paragraph">
      <style:paragraph-properties fo:margin-left="0cm" fo:margin-right="0cm" fo:text-align="center" fo:text-indent="0cm"/>
      <style:text-properties fo:font-size="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9pt"/>
    </style:style>
    <style:style style:name="T2" style:family="text">
      <style:text-properties fo:font-size="8pt"/>
    </style:style>
    <style:style style:name="T3" style:family="text">
      <style:text-properties fo:font-size="1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2" draw:id="id13" draw:layer="layout" svg:width="1.27cm" svg:height="1.271cm" svg:x="33.02cm" svg:y="11.113cm">
            <text:p text:style-name="P1"><text:span text:style-name="T1">Trail</text:span></text:p>
          </draw:rect>
          <draw:rect draw:style-name="gr2" draw:text-style-name="P2" draw:id="id11" draw:layer="layout" svg:width="1.27cm" svg:height="1.271cm" svg:x="30.162cm" svg:y="11.114cm">
            <text:p text:style-name="P1"><text:span text:style-name="T1">Black </text:span></text:p>
            <text:p text:style-name="P1"><text:span text:style-name="T1">Jack</text:span></text:p>
          </draw:rect>
          <draw:rect draw:style-name="gr2" draw:text-style-name="P2" draw:id="id10" draw:layer="layout" svg:width="1.27cm" svg:height="1.271cm" svg:x="30.162cm" svg:y="14.605cm">
            <text:p text:style-name="P1"><text:span text:style-name="T1">Ravine</text:span></text:p>
          </draw:rect>
          <draw:rect draw:style-name="gr2" draw:text-style-name="P2" draw:id="id12" draw:layer="layout" svg:width="1.27cm" svg:height="1.271cm" svg:x="27.94cm" svg:y="11.112cm">
            <text:p text:style-name="P1"><text:span text:style-name="T1">Trail</text:span></text:p>
          </draw:rect>
          <draw:rect draw:style-name="gr2" draw:text-style-name="P2" draw:id="id14" draw:layer="layout" svg:width="1.27cm" svg:height="1.271cm" svg:x="25.718cm" svg:y="11.112cm">
            <text:p text:style-name="P1"><text:span text:style-name="T1">Trail</text:span></text:p>
          </draw:rect>
          <draw:rect draw:style-name="gr2" draw:text-style-name="P3" draw:id="id2" draw:layer="layout" svg:width="1.27cm" svg:height="1.271cm" svg:x="21.59cm" svg:y="11.113cm">
            <text:p text:style-name="P1"><text:span text:style-name="T2">Palmyra</text:span></text:p>
            <text:p text:style-name="P1"><text:span text:style-name="T2">East</text:span></text:p>
          </draw:rect>
          <draw:rect draw:style-name="gr2" draw:text-style-name="P3" draw:id="id1" draw:layer="layout" svg:width="1.27cm" svg:height="1.271cm" svg:x="19.685cm" svg:y="11.112cm">
            <text:p text:style-name="P1"><text:span text:style-name="T2">Palmyra</text:span></text:p>
          </draw:rect>
          <draw:rect draw:style-name="gr2" draw:text-style-name="P3" draw:id="id3" draw:layer="layout" svg:width="1.27cm" svg:height="1.271cm" svg:x="17.78cm" svg:y="11.112cm">
            <text:p text:style-name="P1"><text:span text:style-name="T2">Palmyra</text:span></text:p>
            <text:p text:style-name="P1"><text:span text:style-name="T2">West</text:span></text:p>
          </draw:rect>
          <draw:rect draw:style-name="gr2" draw:text-style-name="P3" draw:id="id4" draw:layer="layout" svg:width="1.27cm" svg:height="1.271cm" svg:x="19.685cm" svg:y="9.208cm">
            <text:p text:style-name="P1"><text:span text:style-name="T2">Palmyra</text:span></text:p>
            <text:p text:style-name="P1"><text:span text:style-name="T2">North</text:span></text:p>
          </draw:rect>
          <draw:rect draw:style-name="gr2" draw:text-style-name="P2" draw:id="id6" draw:layer="layout" svg:width="1.27cm" svg:height="1.271cm" svg:x="21.59cm" svg:y="9.208cm">
            <text:p text:style-name="P1"><text:span text:style-name="T1">Corral</text:span></text:p>
          </draw:rect>
          <draw:rect draw:style-name="gr2" draw:text-style-name="P2" draw:id="id20" draw:layer="layout" svg:width="1.27cm" svg:height="1.271cm" svg:x="17.78cm" svg:y="9.207cm">
            <text:p text:style-name="P1"><text:span text:style-name="T1">Porch</text:span></text:p>
          </draw:rect>
          <draw:rect draw:style-name="gr2" draw:text-style-name="P2" draw:id="id9" draw:layer="layout" svg:width="1.27cm" svg:height="1.271cm" svg:x="21.59cm" svg:y="13.018cm">
            <text:p text:style-name="P1"><text:span text:style-name="T1">Porch</text:span></text:p>
          </draw:rect>
          <draw:rect draw:style-name="gr2" draw:text-style-name="P2" draw:id="id5" draw:layer="layout" svg:width="1.27cm" svg:height="1.271cm" svg:x="19.685cm" svg:y="13.017cm">
            <text:p text:style-name="P1"><text:span text:style-name="T1">Porch</text:span></text:p>
          </draw:rect>
          <draw:rect draw:style-name="gr2" draw:text-style-name="P2" draw:id="id8" draw:layer="layout" svg:width="1.27cm" svg:height="1.271cm" svg:x="17.78cm" svg:y="13.018cm">
            <text:p text:style-name="P1"><text:span text:style-name="T1">Porch</text:span></text:p>
          </draw:rect>
          <draw:connector draw:style-name="gr3" draw:text-style-name="P4" draw:layer="layout" svg:x1="20.955cm" svg:y1="11.747cm" svg:x2="21.59cm" svg:y2="11.748cm" draw:start-shape="id1" draw:start-glue-point="1" draw:end-shape="id2" draw:end-glue-point="3" svg:d="m20955 11747h318v1h317">
            <text:p text:style-name="P6"/>
          </draw:connector>
          <draw:connector draw:style-name="gr3" draw:text-style-name="P4" draw:layer="layout" svg:x1="19.05cm" svg:y1="11.747cm" svg:x2="19.685cm" svg:y2="11.747cm" draw:start-shape="id3" draw:start-glue-point="1" draw:end-shape="id1" draw:end-glue-point="3" svg:d="m19050 11747h635">
            <text:p text:style-name="P6"/>
          </draw:connector>
          <draw:connector draw:style-name="gr3" draw:text-style-name="P4" draw:layer="layout" svg:x1="20.32cm" svg:y1="11.112cm" svg:x2="20.32cm" svg:y2="10.479cm" draw:start-shape="id1" draw:start-glue-point="0" draw:end-shape="id4" draw:end-glue-point="2" svg:d="m20320 11112v-633">
            <text:p text:style-name="P6"/>
          </draw:connector>
          <draw:connector draw:style-name="gr3" draw:text-style-name="P4" draw:layer="layout" svg:x1="20.32cm" svg:y1="12.383cm" svg:x2="20.32cm" svg:y2="13.017cm" draw:start-shape="id1" draw:start-glue-point="2" draw:end-shape="id5" draw:end-glue-point="0" svg:d="m20320 12383v634">
            <text:p text:style-name="P6"/>
          </draw:connector>
          <draw:connector draw:style-name="gr3" draw:text-style-name="P4" draw:layer="layout" svg:x1="20.955cm" svg:y1="9.843cm" svg:x2="21.59cm" svg:y2="9.843cm" draw:start-shape="id4" draw:start-glue-point="1" draw:end-shape="id6" draw:end-glue-point="3" svg:d="m20955 9843h635">
            <text:p text:style-name="P6"/>
          </draw:connector>
          <draw:connector draw:style-name="gr3" draw:text-style-name="P4" draw:layer="layout" svg:x1="22.225cm" svg:y1="10.479cm" svg:x2="22.225cm" svg:y2="11.113cm" draw:start-shape="id6" draw:start-glue-point="2" draw:end-shape="id2" draw:end-glue-point="0" svg:d="m22225 10479v634">
            <text:p text:style-name="P6"/>
          </draw:connector>
          <draw:rect draw:style-name="gr2" draw:text-style-name="P2" draw:id="id7" draw:layer="layout" svg:width="1.27cm" svg:height="1.271cm" svg:x="19.685cm" svg:y="5.396cm">
            <text:p text:style-name="P1"><text:span text:style-name="T1">Farm</text:span></text:p>
            <text:p text:style-name="P1"><text:span text:style-name="T1">Land</text:span></text:p>
          </draw:rect>
          <draw:connector draw:style-name="gr3" draw:text-style-name="P4" draw:layer="layout" svg:x1="20.32cm" svg:y1="6.667cm" svg:x2="20.32cm" svg:y2="9.208cm" draw:start-shape="id7" draw:start-glue-point="2" draw:end-shape="id4" draw:end-glue-point="0" svg:d="m20320 6667v2541">
            <text:p text:style-name="P6"/>
          </draw:connector>
          <draw:connector draw:style-name="gr3" draw:text-style-name="P4" draw:layer="layout" svg:x1="18.415cm" svg:y1="12.383cm" svg:x2="18.415cm" svg:y2="13.018cm" draw:start-shape="id3" draw:start-glue-point="2" draw:end-shape="id8" draw:end-glue-point="0" svg:d="m18415 12383v635">
            <text:p text:style-name="P6"/>
          </draw:connector>
          <draw:connector draw:style-name="gr3" draw:text-style-name="P4" draw:layer="layout" svg:x1="22.225cm" svg:y1="12.384cm" svg:x2="22.225cm" svg:y2="13.018cm" draw:start-shape="id2" draw:start-glue-point="2" draw:end-shape="id9" draw:end-glue-point="0" svg:d="m22225 12384v634">
            <text:p text:style-name="P6"/>
          </draw:connector>
          <draw:rect draw:style-name="gr2" draw:text-style-name="P2" draw:id="id15" draw:layer="layout" svg:width="1.27cm" svg:height="1.271cm" svg:x="23.495cm" svg:y="11.113cm">
            <text:p text:style-name="P1"><text:span text:style-name="T1">Trail</text:span></text:p>
          </draw:rect>
          <draw:rect draw:style-name="gr4" draw:text-style-name="P2" draw:id="id25" draw:layer="layout" svg:width="1.27cm" svg:height="1.271cm" svg:x="30.162cm" svg:y="9.526cm">
            <text:p text:style-name="P1"><text:span text:style-name="T1">House</text:span></text:p>
          </draw:rect>
          <draw:rect draw:style-name="gr4" draw:text-style-name="P2" draw:layer="layout" svg:width="1.27cm" svg:height="1.271cm" svg:x="31.75cm" svg:y="9.525cm">
            <text:p text:style-name="P1"><text:span text:style-name="T1">House</text:span></text:p>
          </draw:rect>
          <draw:rect draw:style-name="gr4" draw:text-style-name="P2" draw:layer="layout" svg:width="1.27cm" svg:height="1.271cm" svg:x="31.75cm" svg:y="12.7cm">
            <text:p text:style-name="P1"><text:span text:style-name="T1">House</text:span></text:p>
          </draw:rect>
          <draw:connector draw:style-name="gr3" draw:text-style-name="P4" draw:layer="layout" svg:x1="30.797cm" svg:y1="14.605cm" svg:x2="30.797cm" svg:y2="12.385cm" draw:start-shape="id10" draw:start-glue-point="0" draw:end-shape="id11" draw:end-glue-point="2" svg:d="m30797 14605v-2220">
            <text:p text:style-name="P6"/>
          </draw:connector>
          <draw:connector draw:style-name="gr3" draw:text-style-name="P4" draw:layer="layout" svg:x1="29.21cm" svg:y1="11.747cm" svg:x2="30.162cm" svg:y2="11.749cm" draw:start-shape="id12" draw:start-glue-point="1" draw:end-shape="id11" draw:end-glue-point="3" svg:d="m29210 11747h476v2h476">
            <text:p text:style-name="P6"/>
          </draw:connector>
          <draw:connector draw:style-name="gr3" draw:text-style-name="P4" draw:layer="layout" svg:x1="31.432cm" svg:y1="11.749cm" svg:x2="33.02cm" svg:y2="11.748cm" draw:start-shape="id11" draw:start-glue-point="1" draw:end-shape="id13" draw:end-glue-point="3" svg:d="m31432 11749h769v-1h819">
            <text:p text:style-name="P6"/>
          </draw:connector>
          <draw:connector draw:style-name="gr3" draw:text-style-name="P4" draw:layer="layout" svg:x1="27.94cm" svg:y1="11.747cm" svg:x2="26.988cm" svg:y2="11.747cm" draw:start-shape="id12" draw:start-glue-point="3" draw:end-shape="id14" draw:end-glue-point="1" svg:d="m27940 11747h-952">
            <text:p text:style-name="P6"/>
          </draw:connector>
          <draw:connector draw:style-name="gr3" draw:text-style-name="P4" draw:layer="layout" svg:x1="24.765cm" svg:y1="11.748cm" svg:x2="25.718cm" svg:y2="11.747cm" draw:start-shape="id15" draw:start-glue-point="1" draw:end-shape="id14" draw:end-glue-point="3" svg:d="m24765 11748h477v-1h476">
            <text:p text:style-name="P6"/>
          </draw:connector>
          <draw:connector draw:style-name="gr3" draw:text-style-name="P4" draw:layer="layout" svg:x1="22.86cm" svg:y1="11.748cm" svg:x2="23.495cm" svg:y2="11.748cm" draw:start-shape="id2" draw:start-glue-point="1" draw:end-shape="id15" draw:end-glue-point="3" svg:d="m22860 11748h635">
            <text:p text:style-name="P6"/>
          </draw:connector>
          <draw:rect draw:style-name="gr4" draw:text-style-name="P2" draw:layer="layout" svg:width="1.27cm" svg:height="1.271cm" svg:x="21.59cm" svg:y="7.303cm">
            <text:p text:style-name="P1"><text:span text:style-name="T1">House</text:span></text:p>
          </draw:rect>
          <draw:rect draw:style-name="gr2" draw:text-style-name="P2" draw:id="id16" draw:layer="layout" svg:width="1.27cm" svg:height="1.271cm" svg:x="14.923cm" svg:y="11.112cm">
            <text:p text:style-name="P1"><text:span text:style-name="T1">Trail</text:span></text:p>
          </draw:rect>
          <draw:connector draw:style-name="gr3" draw:text-style-name="P4" draw:layer="layout" svg:x1="16.193cm" svg:y1="11.747cm" svg:x2="17.78cm" svg:y2="11.747cm" draw:start-shape="id16" draw:start-glue-point="1" draw:end-shape="id3" draw:end-glue-point="3" svg:d="m16193 11747h1587">
            <text:p text:style-name="P6"/>
          </draw:connector>
          <draw:rect draw:style-name="gr1" draw:text-style-name="P2" draw:id="id39" draw:layer="layout" svg:width="1.27cm" svg:height="1.271cm" svg:x="32.067cm" svg:y="16.51cm">
            <text:p text:style-name="P1"><text:span text:style-name="T1">Ravine</text:span></text:p>
          </draw:rect>
          <draw:rect draw:style-name="gr1" draw:text-style-name="P5" draw:id="id22" draw:layer="layout" svg:width="2.54cm" svg:height="1.271cm" svg:x="19.05cm" svg:y="3.175cm">
            <text:p text:style-name="P1"><text:span text:style-name="T3">Prairie</text:span></text:p>
          </draw:rect>
          <draw:line draw:style-name="gr5" draw:text-style-name="P4" draw:layer="layout" svg:x1="20.955cm" svg:y1="9.207cm" svg:x2="21.273cm" svg:y2="8.89cm">
            <text:p text:style-name="P6"/>
          </draw:line>
          <draw:line draw:style-name="gr5" draw:text-style-name="P4" draw:layer="layout" svg:x1="20.955cm" svg:y1="6.667cm" svg:x2="21.59cm" svg:y2="7.302cm">
            <text:p text:style-name="P6"/>
          </draw:line>
          <draw:line draw:style-name="gr5" draw:text-style-name="P4" draw:layer="layout" svg:x1="20.955cm" svg:y1="12.382cm" svg:x2="21.59cm" svg:y2="13.017cm">
            <text:p text:style-name="P6"/>
          </draw:line>
          <draw:rect draw:style-name="gr4" draw:text-style-name="P2" draw:id="id17" draw:layer="layout" svg:width="1.27cm" svg:height="1.271cm" svg:x="17.78cm" svg:y="14.604cm">
            <text:p text:style-name="P1"><text:span text:style-name="T1">House</text:span></text:p>
          </draw:rect>
          <draw:rect draw:style-name="gr4" draw:text-style-name="P2" draw:id="id19" draw:layer="layout" svg:width="1.27cm" svg:height="1.271cm" svg:x="21.59cm" svg:y="14.604cm">
            <text:p text:style-name="P1"><text:span text:style-name="T1">House</text:span></text:p>
          </draw:rect>
          <draw:line draw:style-name="gr5" draw:text-style-name="P4" draw:layer="layout" svg:x1="19.05cm" svg:y1="13.017cm" svg:x2="19.685cm" svg:y2="12.382cm">
            <text:p text:style-name="P6"/>
          </draw:line>
          <draw:line draw:style-name="gr5" draw:text-style-name="P4" draw:layer="layout" svg:x1="31.432cm" svg:y1="15.876cm" svg:x2="32.067cm" svg:y2="16.511cm">
            <text:p text:style-name="P6"/>
          </draw:line>
          <draw:rect draw:style-name="gr4" draw:text-style-name="P2" draw:id="id18" draw:layer="layout" svg:width="1.27cm" svg:height="1.271cm" svg:x="19.685cm" svg:y="14.605cm">
            <text:p text:style-name="P1"><text:span text:style-name="T1">House</text:span></text:p>
          </draw:rect>
          <draw:connector draw:style-name="gr3" draw:text-style-name="P4" draw:layer="layout" svg:x1="18.415cm" svg:y1="14.604cm" svg:x2="18.415cm" svg:y2="14.289cm" draw:start-shape="id17" draw:start-glue-point="0" draw:end-shape="id8" draw:end-glue-point="2" svg:d="m18415 14604v-315">
            <text:p text:style-name="P6"/>
          </draw:connector>
          <draw:connector draw:style-name="gr3" draw:text-style-name="P4" draw:layer="layout" svg:x1="20.32cm" svg:y1="14.605cm" svg:x2="20.32cm" svg:y2="14.288cm" draw:start-shape="id18" draw:start-glue-point="0" draw:end-shape="id5" draw:end-glue-point="2" svg:d="m20320 14605v-317">
            <text:p text:style-name="P6"/>
          </draw:connector>
          <draw:connector draw:style-name="gr3" draw:text-style-name="P4" draw:layer="layout" svg:x1="22.225cm" svg:y1="14.604cm" svg:x2="22.225cm" svg:y2="14.289cm" draw:start-shape="id19" draw:start-glue-point="0" draw:end-shape="id9" draw:end-glue-point="2" svg:d="m22225 14604v-315">
            <text:p text:style-name="P6"/>
          </draw:connector>
          <draw:rect draw:style-name="gr4" draw:text-style-name="P2" draw:id="id21" draw:layer="layout" svg:width="1.27cm" svg:height="1.271cm" svg:x="15.875cm" svg:y="9.206cm">
            <text:p text:style-name="P1"><text:span text:style-name="T1">House</text:span></text:p>
          </draw:rect>
          <draw:rect draw:style-name="gr4" draw:text-style-name="P2" draw:layer="layout" svg:width="1.27cm" svg:height="1.271cm" svg:x="15.875cm" svg:y="6.35cm">
            <text:p text:style-name="P1"><text:span text:style-name="T1">Upstairs</text:span></text:p>
          </draw:rect>
          <draw:connector draw:style-name="gr3" draw:text-style-name="P4" draw:layer="layout" svg:x1="19.05cm" svg:y1="9.842cm" svg:x2="19.685cm" svg:y2="9.843cm" draw:start-shape="id20" draw:start-glue-point="1" draw:end-shape="id4" draw:end-glue-point="3" svg:d="m19050 9842h318v1h317">
            <text:p text:style-name="P6"/>
          </draw:connector>
          <draw:connector draw:style-name="gr3" draw:text-style-name="P4" draw:layer="layout" svg:x1="17.78cm" svg:y1="9.842cm" svg:x2="17.145cm" svg:y2="9.841cm" draw:start-shape="id20" draw:start-glue-point="3" draw:end-shape="id21" draw:end-glue-point="1" svg:d="m17780 9842h-317v-1h-318">
            <text:p text:style-name="P6"/>
          </draw:connector>
          <draw:line draw:style-name="gr5" draw:text-style-name="P4" draw:layer="layout" svg:x1="24.13cm" svg:y1="6.985cm" svg:x2="21.59cm" svg:y2="4.445cm">
            <text:p text:style-name="P6"/>
          </draw:line>
          <draw:connector draw:style-name="gr3" draw:text-style-name="P4" draw:layer="layout" svg:x1="20.32cm" svg:y1="5.396cm" svg:x2="20.32cm" svg:y2="4.446cm" draw:start-shape="id7" draw:start-glue-point="0" draw:end-shape="id22" draw:end-glue-point="2" svg:d="m20320 5396v-950">
            <text:p text:style-name="P6"/>
          </draw:connector>
          <draw:line draw:style-name="gr5" draw:text-style-name="P4" draw:layer="layout" svg:x1="21.273cm" svg:y1="8.89cm" svg:x2="21.273cm" svg:y2="7.937cm">
            <text:p text:style-name="P6"/>
          </draw:line>
          <draw:line draw:style-name="gr5" draw:text-style-name="P4" draw:layer="layout" svg:x1="21.273cm" svg:y1="7.937cm" svg:x2="21.59cm" svg:y2="7.937cm">
            <text:p text:style-name="P6"/>
          </draw:line>
          <draw:line draw:style-name="gr5" draw:text-style-name="P4" draw:layer="layout" svg:x1="19.685cm" svg:y1="6.667cm" svg:x2="17.78cm" svg:y2="8.255cm">
            <text:p text:style-name="P6"/>
          </draw:line>
          <draw:line draw:style-name="gr5" draw:text-style-name="P4" draw:layer="layout" svg:x1="16.51cm" svg:y1="9.207cm" svg:x2="16.51cm" svg:y2="8.255cm">
            <text:p text:style-name="P6"/>
          </draw:line>
          <draw:line draw:style-name="gr5" draw:text-style-name="P4" draw:layer="layout" svg:x1="16.51cm" svg:y1="8.255cm" svg:x2="17.78cm" svg:y2="8.255cm">
            <text:p text:style-name="P6"/>
          </draw:line>
          <draw:line draw:style-name="gr6" draw:text-style-name="P4" draw:layer="layout" svg:x1="16.193cm" svg:y1="9.207cm" svg:x2="16.193cm" svg:y2="7.62cm">
            <text:p text:style-name="P6"/>
          </draw:line>
          <draw:line draw:style-name="gr5" draw:text-style-name="P4" draw:layer="layout" svg:x1="16.193cm" svg:y1="12.382cm" svg:x2="17.78cm" svg:y2="13.017cm">
            <text:p text:style-name="P6"/>
          </draw:line>
          <draw:line draw:style-name="gr5" draw:text-style-name="P4" draw:layer="layout" svg:x1="19.05cm" svg:y1="4.445cm" svg:x2="17.463cm" svg:y2="5.715cm">
            <text:p text:style-name="P6"/>
          </draw:line>
          <draw:line draw:style-name="gr5" draw:text-style-name="P4" draw:layer="layout" svg:x1="17.463cm" svg:y1="5.715cm" svg:x2="15.558cm" svg:y2="5.715cm">
            <text:p text:style-name="P6"/>
          </draw:line>
          <draw:line draw:style-name="gr5" draw:text-style-name="P4" draw:layer="layout" svg:x1="15.558cm" svg:y1="11.112cm" svg:x2="15.558cm" svg:y2="5.715cm">
            <text:p text:style-name="P6"/>
          </draw:line>
          <draw:rect draw:style-name="gr2" draw:text-style-name="P2" draw:id="id23" draw:layer="layout" svg:width="1.27cm" svg:height="1.271cm" svg:x="19.685cm" svg:y="16.51cm">
            <text:p text:style-name="P1"><text:span text:style-name="T1">Farm</text:span></text:p>
            <text:p text:style-name="P1"><text:span text:style-name="T1">Land</text:span></text:p>
          </draw:rect>
          <draw:rect draw:style-name="gr1" draw:text-style-name="P5" draw:id="id24" draw:layer="layout" svg:width="2.54cm" svg:height="1.271cm" svg:x="19.05cm" svg:y="18.731cm">
            <text:p text:style-name="P1"><text:span text:style-name="T3">Prairie</text:span></text:p>
          </draw:rect>
          <draw:connector draw:style-name="gr3" draw:text-style-name="P4" draw:layer="layout" svg:x1="20.32cm" svg:y1="15.876cm" svg:x2="20.32cm" svg:y2="16.51cm" draw:start-shape="id18" draw:start-glue-point="2" draw:end-shape="id23" draw:end-glue-point="0" svg:d="m20320 15876v634">
            <text:p text:style-name="P6"/>
          </draw:connector>
          <draw:connector draw:style-name="gr3" draw:text-style-name="P4" draw:layer="layout" svg:x1="20.32cm" svg:y1="17.781cm" svg:x2="20.32cm" svg:y2="18.731cm" draw:start-shape="id23" draw:start-glue-point="2" draw:end-shape="id24" draw:end-glue-point="0" svg:d="m20320 17781v950">
            <text:p text:style-name="P6"/>
          </draw:connector>
          <draw:line draw:style-name="gr5" draw:text-style-name="P4" draw:layer="layout" svg:x1="15.558cm" svg:y1="12.382cm" svg:x2="15.558cm" svg:y2="15.557cm">
            <text:p text:style-name="P6"/>
          </draw:line>
          <draw:line draw:style-name="gr5" draw:text-style-name="P4" draw:layer="layout" svg:x1="19.05cm" svg:y1="18.732cm" svg:x2="15.558cm" svg:y2="15.557cm">
            <text:p text:style-name="P6"/>
          </draw:line>
          <draw:line draw:style-name="gr5" draw:text-style-name="P4" draw:layer="layout" svg:x1="21.59cm" svg:y1="18.732cm" svg:x2="24.13cm" svg:y2="16.51cm">
            <text:p text:style-name="P6"/>
          </draw:line>
          <draw:line draw:style-name="gr5" draw:text-style-name="P4" draw:layer="layout" svg:x1="24.13cm" svg:y1="12.382cm" svg:x2="24.13cm" svg:y2="16.51cm">
            <text:p text:style-name="P6"/>
          </draw:line>
          <draw:line draw:style-name="gr5" draw:text-style-name="P4" draw:layer="layout" svg:x1="24.13cm" svg:y1="11.112cm" svg:x2="24.13cm" svg:y2="6.985cm">
            <text:p text:style-name="P6"/>
          </draw:line>
          <draw:connector draw:style-name="gr3" draw:text-style-name="P4" draw:layer="layout" svg:x1="30.797cm" svg:y1="11.114cm" svg:x2="30.797cm" svg:y2="10.797cm" draw:start-shape="id11" draw:start-glue-point="0" draw:end-shape="id25" draw:end-glue-point="2" svg:d="m30797 11114v-317">
            <text:p text:style-name="P6"/>
          </draw:connector>
          <draw:line draw:style-name="gr5" draw:text-style-name="P4" draw:layer="layout" svg:x1="31.432cm" svg:y1="11.113cm" svg:x2="31.75cm" svg:y2="10.796cm">
            <text:p text:style-name="P6"/>
          </draw:line>
          <draw:line draw:style-name="gr5" draw:text-style-name="P4" draw:layer="layout" svg:x1="31.432cm" svg:y1="12.383cm" svg:x2="31.75cm" svg:y2="12.701cm">
            <text:p text:style-name="P6"/>
          </draw:line>
          <draw:rect draw:style-name="gr2" draw:text-style-name="P2" draw:id="id26" draw:layer="layout" svg:width="1.27cm" svg:height="1.271cm" svg:x="11.748cm" svg:y="9.839cm">
            <text:p text:style-name="P1"><text:span text:style-name="T1">Trail</text:span></text:p>
          </draw:rect>
          <draw:rect draw:style-name="gr2" draw:text-style-name="P2" draw:id="id27" draw:layer="layout" svg:width="1.27cm" svg:height="1.271cm" svg:x="8.573cm" svg:y="8.893cm">
            <text:p text:style-name="P1"><text:span text:style-name="T1">Trail</text:span></text:p>
          </draw:rect>
          <draw:connector draw:style-name="gr3" draw:text-style-name="P4" draw:layer="layout" svg:x1="13.018cm" svg:y1="10.474cm" svg:x2="14.923cm" svg:y2="11.747cm" draw:start-shape="id26" draw:start-glue-point="1" draw:end-shape="id16" draw:end-glue-point="3" svg:d="m13018 10474h953v1273h952">
            <text:p text:style-name="P6"/>
          </draw:connector>
          <draw:connector draw:style-name="gr3" draw:text-style-name="P4" draw:layer="layout" svg:x1="11.748cm" svg:y1="10.476cm" svg:x2="9.843cm" svg:y2="9.528cm" draw:end-shape="id27" draw:end-glue-point="1" svg:d="m11748 10476h-702v-948h-1203">
            <text:p text:style-name="P6"/>
          </draw:connector>
          <draw:rect draw:style-name="gr2" draw:text-style-name="P3" draw:id="id29" draw:layer="layout" svg:width="1.27cm" svg:height="1.271cm" svg:x="6.668cm" svg:y="8.892cm">
            <text:p text:style-name="P1"><text:span text:style-name="T2">Prairie</text:span></text:p>
            <text:p text:style-name="P1"><text:span text:style-name="T2">City E</text:span></text:p>
          </draw:rect>
          <draw:rect draw:style-name="gr2" draw:text-style-name="P3" draw:id="id28" draw:layer="layout" svg:width="1.27cm" svg:height="1.271cm" svg:x="4.763cm" svg:y="8.891cm">
            <text:p text:style-name="P1"><text:span text:style-name="T2">Prairie</text:span></text:p>
            <text:p text:style-name="P1"><text:span text:style-name="T2">City</text:span></text:p>
          </draw:rect>
          <draw:rect draw:style-name="gr2" draw:text-style-name="P3" draw:id="id30" draw:layer="layout" svg:width="1.27cm" svg:height="1.271cm" svg:x="2.858cm" svg:y="8.891cm">
            <text:p text:style-name="P1"><text:span text:style-name="T2">Prairie</text:span></text:p>
            <text:p text:style-name="P1"><text:span text:style-name="T2">City W</text:span></text:p>
          </draw:rect>
          <draw:rect draw:style-name="gr2" draw:text-style-name="P3" draw:id="id31" draw:layer="layout" svg:width="1.27cm" svg:height="1.271cm" svg:x="4.763cm" svg:y="6.987cm">
            <text:p text:style-name="P1"><text:span text:style-name="T2">Prairie</text:span></text:p>
            <text:p text:style-name="P1"><text:span text:style-name="T2">City N</text:span></text:p>
          </draw:rect>
          <draw:rect draw:style-name="gr4" draw:text-style-name="P2" draw:id="id33" draw:layer="layout" svg:width="1.27cm" svg:height="1.271cm" svg:x="6.668cm" svg:y="6.987cm">
            <text:p text:style-name="P1"><text:span text:style-name="T1">House</text:span></text:p>
          </draw:rect>
          <draw:rect draw:style-name="gr4" draw:text-style-name="P2" draw:id="id36" draw:layer="layout" svg:width="1.27cm" svg:height="1.271cm" svg:x="2.858cm" svg:y="6.986cm">
            <text:p text:style-name="P1"><text:span text:style-name="T1">House</text:span></text:p>
          </draw:rect>
          <draw:rect draw:style-name="gr4" draw:text-style-name="P2" draw:id="id35" draw:layer="layout" svg:width="1.27cm" svg:height="1.271cm" svg:x="6.668cm" svg:y="10.797cm">
            <text:p text:style-name="P1"><text:span text:style-name="T1">House</text:span></text:p>
          </draw:rect>
          <draw:rect draw:style-name="gr2" draw:text-style-name="P2" draw:id="id32" draw:layer="layout" svg:width="1.27cm" svg:height="1.271cm" svg:x="4.763cm" svg:y="10.796cm">
            <text:p text:style-name="P1"><text:span text:style-name="T1">Prairie</text:span></text:p>
            <text:p text:style-name="P1"><text:span text:style-name="T1">City S</text:span></text:p>
          </draw:rect>
          <draw:rect draw:style-name="gr4" draw:text-style-name="P2" draw:id="id34" draw:layer="layout" svg:width="1.27cm" svg:height="1.271cm" svg:x="2.858cm" svg:y="10.797cm">
            <text:p text:style-name="P1"><text:span text:style-name="T1">House</text:span></text:p>
          </draw:rect>
          <draw:connector draw:style-name="gr3" draw:text-style-name="P4" draw:layer="layout" svg:x1="6.033cm" svg:y1="9.526cm" svg:x2="6.668cm" svg:y2="9.527cm" draw:start-shape="id28" draw:start-glue-point="1" draw:end-shape="id29" draw:end-glue-point="3" svg:d="m6033 9526h318v1h317">
            <text:p text:style-name="P6"/>
          </draw:connector>
          <draw:connector draw:style-name="gr3" draw:text-style-name="P4" draw:layer="layout" svg:x1="4.128cm" svg:y1="9.526cm" svg:x2="4.763cm" svg:y2="9.526cm" draw:start-shape="id30" draw:start-glue-point="1" draw:end-shape="id28" draw:end-glue-point="3" svg:d="m4128 9526h635">
            <text:p text:style-name="P6"/>
          </draw:connector>
          <draw:connector draw:style-name="gr3" draw:text-style-name="P4" draw:layer="layout" svg:x1="5.398cm" svg:y1="8.891cm" svg:x2="5.398cm" svg:y2="8.258cm" draw:start-shape="id28" draw:start-glue-point="0" draw:end-shape="id31" draw:end-glue-point="2" svg:d="m5398 8891v-633">
            <text:p text:style-name="P6"/>
          </draw:connector>
          <draw:connector draw:style-name="gr3" draw:text-style-name="P4" draw:layer="layout" svg:x1="5.398cm" svg:y1="10.162cm" svg:x2="5.398cm" svg:y2="10.796cm" draw:start-shape="id28" draw:start-glue-point="2" draw:end-shape="id32" draw:end-glue-point="0" svg:d="m5398 10162v634">
            <text:p text:style-name="P6"/>
          </draw:connector>
          <draw:connector draw:style-name="gr3" draw:text-style-name="P4" draw:layer="layout" svg:x1="6.033cm" svg:y1="7.622cm" svg:x2="6.668cm" svg:y2="7.622cm" draw:start-shape="id31" draw:start-glue-point="1" draw:end-shape="id33" draw:end-glue-point="3" svg:d="m6033 7622h635">
            <text:p text:style-name="P6"/>
          </draw:connector>
          <draw:connector draw:style-name="gr3" draw:text-style-name="P4" draw:layer="layout" svg:x1="3.493cm" svg:y1="10.162cm" svg:x2="3.493cm" svg:y2="10.797cm" draw:start-shape="id30" draw:start-glue-point="2" draw:end-shape="id34" draw:end-glue-point="0" svg:d="m3493 10162v635">
            <text:p text:style-name="P6"/>
          </draw:connector>
          <draw:connector draw:style-name="gr3" draw:text-style-name="P4" draw:layer="layout" svg:x1="7.303cm" svg:y1="10.163cm" svg:x2="7.303cm" svg:y2="10.797cm" draw:start-shape="id29" draw:start-glue-point="2" draw:end-shape="id35" draw:end-glue-point="0" svg:d="m7303 10163v634">
            <text:p text:style-name="P6"/>
          </draw:connector>
          <draw:line draw:style-name="gr5" draw:text-style-name="P4" draw:layer="layout" svg:x1="6.033cm" svg:y1="10.161cm" svg:x2="6.668cm" svg:y2="10.796cm">
            <text:p text:style-name="P6"/>
          </draw:line>
          <draw:line draw:style-name="gr5" draw:text-style-name="P4" draw:layer="layout" svg:x1="4.128cm" svg:y1="10.796cm" svg:x2="4.763cm" svg:y2="10.161cm">
            <text:p text:style-name="P6"/>
          </draw:line>
          <draw:connector draw:style-name="gr3" draw:text-style-name="P4" draw:layer="layout" svg:x1="4.128cm" svg:y1="7.621cm" svg:x2="4.763cm" svg:y2="7.622cm" draw:start-shape="id36" draw:start-glue-point="1" draw:end-shape="id31" draw:end-glue-point="3" svg:d="m4128 7621h318v1h317">
            <text:p text:style-name="P6"/>
          </draw:connector>
          <draw:connector draw:style-name="gr3" draw:text-style-name="P4" draw:layer="layout" svg:x1="7.938cm" svg:y1="9.527cm" svg:x2="8.573cm" svg:y2="9.528cm" draw:start-shape="id29" draw:start-glue-point="1" draw:end-shape="id27" draw:end-glue-point="3" svg:d="m7938 9527h318v1h317">
            <text:p text:style-name="P6"/>
          </draw:connector>
          <draw:rect draw:style-name="gr1" draw:text-style-name="P2" draw:id="id37" draw:layer="layout" svg:width="1.27cm" svg:height="1.271cm" svg:x="0.953cm" svg:y="8.891cm">
            <text:p text:style-name="P1"><text:span text:style-name="T1">Trail</text:span></text:p>
          </draw:rect>
          <draw:connector draw:style-name="gr3" draw:text-style-name="P4" draw:layer="layout" svg:x1="2.858cm" svg:y1="9.526cm" svg:x2="2.223cm" svg:y2="9.526cm" draw:start-shape="id30" draw:start-glue-point="3" draw:end-shape="id37" draw:end-glue-point="1" svg:d="m2858 9526h-635">
            <text:p text:style-name="P6"/>
          </draw:connector>
          <draw:rect draw:style-name="gr2" draw:text-style-name="P2" draw:id="id43" draw:layer="layout" svg:width="1.27cm" svg:height="1.271cm" svg:x="4.763cm" svg:y="4.761cm">
            <text:p text:style-name="P1"><text:span text:style-name="T1">Farm</text:span></text:p>
            <text:p text:style-name="P1"><text:span text:style-name="T1">Land</text:span></text:p>
          </draw:rect>
          <draw:rect draw:style-name="gr1" draw:text-style-name="P5" draw:id="id38" draw:layer="layout" svg:width="2.54cm" svg:height="1.271cm" svg:x="28.893cm" svg:y="3.175cm">
            <text:p text:style-name="P1"><text:span text:style-name="T3">Prairie</text:span></text:p>
          </draw:rect>
          <draw:connector draw:style-name="gr3" draw:text-style-name="P4" draw:layer="layout" svg:x1="28.893cm" svg:y1="3.81cm" svg:x2="21.59cm" svg:y2="3.81cm" draw:start-shape="id38" draw:start-glue-point="3" draw:end-shape="id22" draw:end-glue-point="1" svg:d="m28893 3810h-7303">
            <text:p text:style-name="P6"/>
          </draw:connector>
          <draw:connector draw:style-name="gr3" draw:text-style-name="P4" draw:layer="layout" svg:x1="30.163cm" svg:y1="4.446cm" svg:x2="28.575cm" svg:y2="11.112cm" draw:start-shape="id38" draw:start-glue-point="2" draw:end-shape="id12" draw:end-glue-point="0" svg:d="m30163 4446v3359h-1588v3307">
            <text:p text:style-name="P6"/>
          </draw:connector>
          <draw:line draw:style-name="gr5" draw:text-style-name="P4" draw:layer="layout" svg:x1="31.433cm" svg:y1="4.445cm" svg:x2="33.655cm" svg:y2="6.667cm">
            <text:p text:style-name="P6"/>
          </draw:line>
          <draw:line draw:style-name="gr5" draw:text-style-name="P4" draw:layer="layout" svg:x1="33.655cm" svg:y1="6.667cm" svg:x2="33.655cm" svg:y2="11.112cm">
            <text:p text:style-name="P6"/>
          </draw:line>
          <draw:line draw:style-name="gr5" draw:text-style-name="P4" draw:layer="layout" svg:x1="26.353cm" svg:y1="11.112cm" svg:x2="26.353cm" svg:y2="7.302cm">
            <text:p text:style-name="P6"/>
          </draw:line>
          <draw:line draw:style-name="gr5" draw:text-style-name="P4" draw:layer="layout" svg:x1="28.893cm" svg:y1="4.445cm" svg:x2="26.353cm" svg:y2="7.302cm">
            <text:p text:style-name="P6"/>
          </draw:line>
          <draw:connector draw:style-name="gr3" draw:text-style-name="P4" draw:layer="layout" svg:x1="32.702cm" svg:y1="16.51cm" svg:x2="33.655cm" svg:y2="12.384cm" draw:start-shape="id39" draw:start-glue-point="0" draw:end-shape="id13" draw:end-glue-point="2" svg:d="m32702 16510v-2063h953v-2063">
            <text:p text:style-name="P6"/>
          </draw:connector>
          <draw:rect draw:style-name="gr1" draw:text-style-name="P5" draw:id="id40" draw:layer="layout" svg:width="2.54cm" svg:height="1.271cm" svg:x="28.575cm" svg:y="18.731cm">
            <text:p text:style-name="P1"><text:span text:style-name="T3">Prairie</text:span></text:p>
          </draw:rect>
          <draw:line draw:style-name="gr5" draw:text-style-name="P4" draw:layer="layout" svg:x1="31.115cm" svg:y1="18.732cm" svg:x2="32.068cm" svg:y2="17.78cm">
            <text:p text:style-name="P6"/>
          </draw:line>
          <draw:connector draw:style-name="gr3" draw:text-style-name="P4" draw:layer="layout" svg:x1="29.845cm" svg:y1="18.731cm" svg:x2="30.797cm" svg:y2="15.876cm" draw:start-shape="id40" draw:start-glue-point="0" draw:end-shape="id10" draw:end-glue-point="2" svg:d="m29845 18731v-1453h952v-1402">
            <text:p text:style-name="P6"/>
          </draw:connector>
          <draw:line draw:style-name="gr5" draw:text-style-name="P4" draw:layer="layout" svg:x1="26.353cm" svg:y1="12.382cm" svg:x2="26.353cm" svg:y2="16.51cm">
            <text:p text:style-name="P6"/>
          </draw:line>
          <draw:line draw:style-name="gr5" draw:text-style-name="P4" draw:layer="layout" svg:x1="28.575cm" svg:y1="18.732cm" svg:x2="26.353cm" svg:y2="16.51cm">
            <text:p text:style-name="P6"/>
          </draw:line>
          <draw:connector draw:style-name="gr3" draw:text-style-name="P4" draw:layer="layout" svg:x1="21.59cm" svg:y1="19.366cm" svg:x2="28.575cm" svg:y2="19.366cm" draw:start-shape="id24" draw:start-glue-point="1" draw:end-shape="id40" draw:end-glue-point="3" svg:d="m21590 19366h6985">
            <text:p text:style-name="P6"/>
          </draw:connector>
          <draw:line draw:style-name="gr5" draw:text-style-name="P4" draw:layer="layout" svg:x1="30.163cm" svg:y1="14.605cm" svg:x2="28.575cm" svg:y2="13.017cm">
            <text:p text:style-name="P6"/>
          </draw:line>
          <draw:line draw:style-name="gr5" draw:text-style-name="P4" draw:layer="layout" svg:x1="28.575cm" svg:y1="12.382cm" svg:x2="28.575cm" svg:y2="13.017cm">
            <text:p text:style-name="P6"/>
          </draw:line>
          <draw:rect draw:style-name="gr1" draw:text-style-name="P5" draw:id="id41" draw:layer="layout" svg:width="2.54cm" svg:height="1.271cm" svg:x="4.128cm" svg:y="3.175cm">
            <text:p text:style-name="P1"><text:span text:style-name="T3">Prairie</text:span></text:p>
          </draw:rect>
          <draw:rect draw:style-name="gr1" draw:text-style-name="P5" draw:id="id42" draw:layer="layout" svg:width="2.54cm" svg:height="1.271cm" svg:x="4.128cm" svg:y="18.732cm">
            <text:p text:style-name="P1"><text:span text:style-name="T3">Prairie</text:span></text:p>
          </draw:rect>
          <draw:rect draw:style-name="gr2" draw:text-style-name="P2" draw:id="id49" draw:layer="layout" svg:width="1.27cm" svg:height="1.271cm" svg:x="6.35cm" svg:y="12.382cm">
            <text:p text:style-name="P1"><text:span text:style-name="T1">Ottawa</text:span></text:p>
            <text:p text:style-name="P1"><text:span text:style-name="T1">Lane</text:span></text:p>
          </draw:rect>
          <draw:rect draw:style-name="gr2" draw:text-style-name="P2" draw:id="id44" draw:layer="layout" svg:width="1.27cm" svg:height="1.271cm" svg:x="9.525cm" svg:y="15.559cm">
            <text:p text:style-name="P1"><text:span text:style-name="T1">Ottawa</text:span></text:p>
            <text:p text:style-name="P1"><text:span text:style-name="T1">Creek</text:span></text:p>
          </draw:rect>
          <draw:line draw:style-name="gr5" draw:text-style-name="P4" draw:layer="layout" svg:x1="6.033cm" svg:y1="12.065cm" svg:x2="6.35cm" svg:y2="12.383cm">
            <text:p text:style-name="P6"/>
          </draw:line>
          <draw:line draw:style-name="gr5" draw:text-style-name="P4" draw:layer="layout" svg:x1="7.62cm" svg:y1="13.653cm" svg:x2="7.938cm" svg:y2="13.97cm">
            <text:p text:style-name="P6"/>
          </draw:line>
          <draw:connector draw:style-name="gr3" draw:text-style-name="P4" draw:layer="layout" svg:x1="6.668cm" svg:y1="11.432cm" svg:x2="6.033cm" svg:y2="11.431cm" draw:start-shape="id35" draw:start-glue-point="3" draw:end-shape="id32" draw:end-glue-point="1" svg:d="m6668 11432h-317v-1h-318">
            <text:p text:style-name="P6"/>
          </draw:connector>
          <draw:connector draw:style-name="gr3" draw:text-style-name="P4" draw:layer="layout" svg:x1="6.668cm" svg:y1="3.81cm" svg:x2="19.05cm" svg:y2="3.81cm" draw:start-shape="id41" draw:start-glue-point="1" draw:end-shape="id22" draw:end-glue-point="3" svg:d="m6668 3810h12382">
            <text:p text:style-name="P6"/>
          </draw:connector>
          <draw:connector draw:style-name="gr3" draw:text-style-name="P4" draw:layer="layout" svg:x1="19.05cm" svg:y1="19.366cm" svg:x2="6.668cm" svg:y2="19.367cm" draw:start-shape="id24" draw:start-glue-point="3" draw:end-shape="id42" draw:end-glue-point="1" svg:d="m19050 19366h-6191v1h-6191">
            <text:p text:style-name="P6"/>
          </draw:connector>
          <draw:rect draw:style-name="gr2" draw:text-style-name="P2" draw:id="id48" draw:layer="layout" svg:width="1.27cm" svg:height="1.271cm" svg:x="6.668cm" svg:y="16.193cm">
            <text:p text:style-name="P1"><text:span text:style-name="T1">Farm</text:span></text:p>
            <text:p text:style-name="P1"><text:span text:style-name="T1">Land</text:span></text:p>
          </draw:rect>
          <draw:rect draw:style-name="gr2" draw:text-style-name="P2" draw:layer="layout" svg:width="1.27cm" svg:height="1.271cm" svg:x="7.938cm" svg:y="13.971cm">
            <text:p text:style-name="P1"><text:span text:style-name="T1">Ottawa</text:span></text:p>
            <text:p text:style-name="P1"><text:span text:style-name="T1">Lane</text:span></text:p>
          </draw:rect>
          <draw:line draw:style-name="gr5" draw:text-style-name="P4" draw:layer="layout" svg:x1="9.207cm" svg:y1="15.241cm" svg:x2="9.525cm" svg:y2="15.558cm">
            <text:p text:style-name="P6"/>
          </draw:line>
          <draw:line draw:style-name="gr5" draw:text-style-name="P4" draw:layer="layout" svg:x1="4.128cm" svg:y1="4.445cm" svg:x2="1.588cm" svg:y2="6.667cm">
            <text:p text:style-name="P6"/>
          </draw:line>
          <draw:line draw:style-name="gr5" draw:text-style-name="P4" draw:layer="layout" svg:x1="1.588cm" svg:y1="8.89cm" svg:x2="1.588cm" svg:y2="6.667cm">
            <text:p text:style-name="P6"/>
          </draw:line>
          <draw:connector draw:style-name="gr3" draw:text-style-name="P4" draw:layer="layout" svg:x1="5.398cm" svg:y1="4.446cm" svg:x2="5.398cm" svg:y2="4.761cm" draw:start-shape="id41" draw:start-glue-point="2" draw:end-shape="id43" draw:end-glue-point="0" svg:d="m5398 4446v315">
            <text:p text:style-name="P6"/>
          </draw:connector>
          <draw:connector draw:style-name="gr3" draw:text-style-name="P4" draw:layer="layout" svg:x1="5.398cm" svg:y1="6.032cm" svg:x2="5.398cm" svg:y2="6.987cm" draw:start-shape="id43" draw:start-glue-point="2" draw:end-shape="id31" draw:end-glue-point="0" svg:d="m5398 6032v955">
            <text:p text:style-name="P6"/>
          </draw:connector>
          <draw:line draw:style-name="gr5" draw:text-style-name="P4" draw:layer="layout" svg:x1="4.128cm" svg:y1="18.732cm" svg:x2="1.588cm" svg:y2="15.875cm">
            <text:p text:style-name="P6"/>
          </draw:line>
          <draw:line draw:style-name="gr5" draw:text-style-name="P4" draw:layer="layout" svg:x1="1.588cm" svg:y1="10.16cm" svg:x2="1.588cm" svg:y2="15.875cm">
            <text:p text:style-name="P6"/>
          </draw:line>
          <draw:line draw:style-name="gr5" draw:text-style-name="P4" draw:layer="layout" svg:x1="6.668cm" svg:y1="4.445cm" svg:x2="7.303cm" svg:y2="5.08cm">
            <text:p text:style-name="P6"/>
          </draw:line>
          <draw:line draw:style-name="gr5" draw:text-style-name="P4" draw:layer="layout" svg:x1="12.383cm" svg:y1="9.842cm" svg:x2="12.383cm" svg:y2="5.08cm">
            <text:p text:style-name="P6"/>
          </draw:line>
          <draw:line draw:style-name="gr5" draw:text-style-name="P4" draw:layer="layout" svg:x1="7.303cm" svg:y1="5.08cm" svg:x2="12.383cm" svg:y2="5.08cm">
            <text:p text:style-name="P6"/>
          </draw:line>
          <draw:rect draw:style-name="gr4" draw:text-style-name="P2" draw:id="id45" draw:layer="layout" svg:width="1.27cm" svg:height="1.271cm" svg:x="9.525cm" svg:y="17.147cm">
            <text:p text:style-name="P1"><text:span text:style-name="T1">House</text:span></text:p>
          </draw:rect>
          <draw:connector draw:style-name="gr3" draw:text-style-name="P4" draw:layer="layout" svg:x1="10.16cm" svg:y1="16.83cm" svg:x2="10.16cm" svg:y2="17.147cm" draw:start-shape="id44" draw:start-glue-point="2" draw:end-shape="id45" draw:end-glue-point="0" svg:d="m10160 16830v317">
            <text:p text:style-name="P6"/>
          </draw:connector>
          <draw:rect draw:style-name="gr4" draw:text-style-name="P2" draw:id="id47" draw:layer="layout" svg:width="1.27cm" svg:height="1.271cm" svg:x="4.763cm" svg:y="13.971cm">
            <text:p text:style-name="P1"><text:span text:style-name="T1">House</text:span></text:p>
          </draw:rect>
          <draw:line draw:style-name="gr5" draw:text-style-name="P4" draw:layer="layout" svg:x1="6.033cm" svg:y1="13.972cm" svg:x2="6.35cm" svg:y2="13.654cm">
            <text:p text:style-name="P6"/>
          </draw:line>
          <draw:rect draw:style-name="gr2" draw:text-style-name="P2" draw:id="id46" draw:layer="layout" svg:width="1.27cm" svg:height="1.271cm" svg:x="2.858cm" svg:y="13.971cm">
            <text:p text:style-name="P1"><text:span text:style-name="T1">Farm</text:span></text:p>
            <text:p text:style-name="P1"><text:span text:style-name="T1">Land</text:span></text:p>
          </draw:rect>
          <draw:line draw:style-name="gr5" draw:text-style-name="P4" draw:layer="layout" svg:x1="6.668cm" svg:y1="18.732cm" svg:x2="7.303cm" svg:y2="18.415cm">
            <text:p text:style-name="P6"/>
          </draw:line>
          <draw:line draw:style-name="gr5" draw:text-style-name="P4" draw:layer="layout" svg:x1="7.303cm" svg:y1="18.417cm" svg:x2="7.303cm" svg:y2="17.464cm">
            <text:p text:style-name="P6"/>
          </draw:line>
          <draw:connector draw:style-name="gr3" draw:text-style-name="P4" draw:layer="layout" svg:x1="3.493cm" svg:y1="15.242cm" svg:x2="5.398cm" svg:y2="18.732cm" draw:start-shape="id46" draw:start-glue-point="2" draw:end-shape="id42" svg:d="m3493 15242v1720h1905v1770">
            <text:p text:style-name="P6"/>
          </draw:connector>
          <draw:connector draw:style-name="gr3" draw:text-style-name="P4" draw:layer="layout" svg:x1="4.128cm" svg:y1="14.606cm" svg:x2="4.763cm" svg:y2="14.606cm" draw:start-shape="id46" draw:start-glue-point="1" draw:end-shape="id47" draw:end-glue-point="3" svg:d="m4128 14606h635">
            <text:p text:style-name="P6"/>
          </draw:connector>
          <draw:connector draw:style-name="gr3" draw:text-style-name="P4" draw:layer="layout" svg:x1="3.493cm" svg:y1="13.971cm" svg:x2="5.398cm" svg:y2="12.067cm" draw:start-shape="id46" draw:start-glue-point="0" draw:end-shape="id32" draw:end-glue-point="2" svg:d="m3493 13971v-952h1905v-952">
            <text:p text:style-name="P6"/>
          </draw:connector>
          <draw:rect draw:style-name="gr2" draw:text-style-name="P2" draw:id="id50" draw:layer="layout" svg:width="1.27cm" svg:height="1.271cm" svg:x="9.525cm" svg:y="12.383cm">
            <text:p text:style-name="P1"><text:span text:style-name="T1">Prairie</text:span></text:p>
          </draw:rect>
          <draw:connector draw:style-name="gr3" draw:text-style-name="P4" draw:layer="layout" svg:x1="7.938cm" svg:y1="16.828cm" svg:x2="9.525cm" svg:y2="16.194cm" draw:start-shape="id48" draw:start-glue-point="1" draw:end-shape="id44" draw:end-glue-point="3" svg:d="m7938 16828h794v-634h793">
            <text:p text:style-name="P6"/>
          </draw:connector>
          <draw:connector draw:style-name="gr3" draw:text-style-name="P4" draw:layer="layout" svg:x1="7.62cm" svg:y1="13.017cm" svg:x2="9.525cm" svg:y2="13.018cm" draw:start-shape="id49" draw:start-glue-point="1" draw:end-shape="id50" draw:end-glue-point="3" svg:d="m7620 13017h953v1h952">
            <text:p text:style-name="P6"/>
          </draw:connector>
          <draw:line draw:style-name="gr5" draw:text-style-name="P4" draw:layer="layout" svg:x1="9.208cm" svg:y1="13.972cm" svg:x2="9.525cm" svg:y2="13.654cm">
            <text:p text:style-name="P6"/>
          </draw:line>
          <draw:connector draw:style-name="gr3" draw:text-style-name="P4" draw:layer="layout" svg:x1="10.16cm" svg:y1="12.383cm" svg:x2="12.383cm" svg:y2="11.11cm" draw:start-shape="id50" draw:start-glue-point="0" draw:end-shape="id26" draw:end-glue-point="2" svg:d="m10160 12383v-636h2223v-637">
            <text:p text:style-name="P6"/>
          </draw:connector>
          <draw:line draw:style-name="gr5" draw:text-style-name="P4" draw:layer="layout" svg:x1="10.795cm" svg:y1="13.017cm" svg:x2="14.288cm" svg:y2="13.017cm">
            <text:p text:style-name="P6"/>
          </draw:line>
          <draw:line draw:style-name="gr5" draw:text-style-name="P4" draw:layer="layout" svg:x1="14.923cm" svg:y1="12.382cm" svg:x2="14.288cm" svg:y2="13.017cm">
            <text:p text:style-name="P6"/>
          </draw:line>
          <draw:connector draw:style-name="gr3" draw:text-style-name="P4" draw:layer="layout" svg:x1="10.16cm" svg:y1="13.654cm" svg:x2="10.16cm" svg:y2="15.559cm" draw:start-shape="id50" draw:start-glue-point="2" draw:end-shape="id44" draw:end-glue-point="0" svg:d="m10160 13654v1905">
            <text:p text:style-name="P6"/>
          </draw:connector>
          <draw:line draw:style-name="gr5" draw:text-style-name="P4" draw:layer="layout" svg:x1="10.795cm" svg:y1="13.654cm" svg:x2="11.748cm" svg:y2="14.924cm">
            <text:p text:style-name="P6"/>
          </draw:line>
          <draw:line draw:style-name="gr5" draw:text-style-name="P4" draw:layer="layout" svg:x1="11.748cm" svg:y1="14.924cm" svg:x2="11.748cm" svg:y2="16.194cm">
            <text:p text:style-name="P6"/>
          </draw:line>
          <draw:line draw:style-name="gr5" draw:text-style-name="P4" draw:layer="layout" svg:x1="10.795cm" svg:y1="16.194cm" svg:x2="11.748cm" svg:y2="16.194cm">
            <text:p text:style-name="P6"/>
          </draw:line>
          <draw:line draw:style-name="gr5" draw:text-style-name="P4" draw:layer="layout" svg:x1="2.223cm" svg:y1="10.16cm" svg:x2="2.54cm" svg:y2="10.477cm">
            <text:p text:style-name="P6"/>
          </draw:line>
          <draw:line draw:style-name="gr5" draw:text-style-name="P4" draw:layer="layout" svg:x1="2.54cm" svg:y1="10.477cm" svg:x2="2.54cm" svg:y2="13.652cm">
            <text:p text:style-name="P6"/>
          </draw:line>
          <draw:line draw:style-name="gr5" draw:text-style-name="P4" draw:layer="layout" svg:x1="2.54cm" svg:y1="13.652cm" svg:x2="2.858cm" svg:y2="13.97cm">
            <text:p text:style-name="P6"/>
          </draw:line>
          <draw:line draw:style-name="gr5" draw:text-style-name="P4" draw:layer="layout" svg:x1="2.223cm" svg:y1="8.89cm" svg:x2="2.54cm" svg:y2="8.572cm">
            <text:p text:style-name="P6"/>
          </draw:line>
          <draw:line draw:style-name="gr5" draw:text-style-name="P4" draw:layer="layout" svg:x1="2.54cm" svg:y1="8.572cm" svg:x2="2.54cm" svg:y2="6.667cm">
            <text:p text:style-name="P6"/>
          </draw:line>
          <draw:line draw:style-name="gr5" draw:text-style-name="P4" draw:layer="layout" svg:x1="4.763cm" svg:y1="6.033cm" svg:x2="4.128cm" svg:y2="6.667cm">
            <text:p text:style-name="P6"/>
          </draw:line>
          <draw:line draw:style-name="gr5" draw:text-style-name="P4" draw:layer="layout" svg:x1="4.128cm" svg:y1="6.667cm" svg:x2="2.54cm" svg:y2="6.667cm">
            <text:p text:style-name="P6"/>
          </draw:line>
          <draw:connector draw:style-name="gr3" draw:text-style-name="P4" draw:layer="layout" svg:x1="6.985cm" svg:y1="13.653cm" svg:x2="7.303cm" svg:y2="16.193cm" draw:start-shape="id49" draw:start-glue-point="2" draw:end-shape="id48" draw:end-glue-point="0" svg:d="m6985 13653v1270h318v1270">
            <text:p text:style-name="P6"/>
          </draw:connector>
          <draw:line draw:style-name="gr5" draw:text-style-name="P4" draw:layer="layout" svg:x1="7.938cm" svg:y1="16.194cm" svg:x2="8.573cm" svg:y2="15.877cm">
            <text:p text:style-name="P6"/>
          </draw:line>
          <draw:line draw:style-name="gr5" draw:text-style-name="P4" draw:layer="layout" svg:x1="8.573cm" svg:y1="15.877cm" svg:x2="8.573cm" svg:y2="15.242cm">
            <text:p text:style-name="P6"/>
          </draw:line>
          <draw:connector draw:style-name="gr3" draw:text-style-name="P4" draw:layer="layout" svg:x1="4.763cm" svg:y1="11.431cm" svg:x2="4.128cm" svg:y2="11.432cm" draw:start-shape="id32" draw:start-glue-point="3" draw:end-shape="id34" draw:end-glue-point="1" svg:d="m4763 11431h-317v1h-318">
            <text:p text:style-name="P6"/>
          </draw:connector>
          <draw:connector draw:style-name="gr3" draw:text-style-name="P4" draw:layer="layout" svg:x1="7.303cm" svg:y1="8.892cm" svg:x2="7.303cm" svg:y2="8.258cm" draw:start-shape="id29" draw:start-glue-point="0" draw:end-shape="id33" draw:end-glue-point="2" svg:d="m7303 8892v-634">
            <text:p text:style-name="P6"/>
          </draw:connector>
          <draw:connector draw:style-name="gr3" draw:text-style-name="P4" draw:layer="layout" svg:x1="3.493cm" svg:y1="8.891cm" svg:x2="3.493cm" svg:y2="8.257cm" draw:start-shape="id30" draw:start-glue-point="0" draw:end-shape="id36" draw:end-glue-point="2" svg:d="m3493 8891v-634">
            <text:p text:style-name="P6"/>
          </draw:connector>
          <draw:line draw:style-name="gr5" draw:text-style-name="P4" draw:layer="layout" svg:x1="6.033cm" svg:y1="8.892cm" svg:x2="6.668cm" svg:y2="8.257cm">
            <text:p text:style-name="P6"/>
          </draw:line>
          <draw:line draw:style-name="gr5" draw:text-style-name="P4" draw:layer="layout" svg:x1="4.763cm" svg:y1="8.892cm" svg:x2="4.128cm" svg:y2="8.257cm">
            <text:p text:style-name="P6"/>
          </draw:line>
          <draw:rect draw:style-name="gr4" draw:text-style-name="P2" draw:id="id51" draw:layer="layout" svg:width="1.27cm" svg:height="1.271cm" svg:x="8.255cm" svg:y="6.033cm">
            <text:p text:style-name="P1"><text:span text:style-name="T1">House</text:span></text:p>
          </draw:rect>
          <draw:line draw:style-name="gr5" draw:text-style-name="P4" draw:layer="layout" svg:x1="6.033cm" svg:y1="6.987cm" svg:x2="6.35cm" svg:y2="6.669cm">
            <text:p text:style-name="P6"/>
          </draw:line>
          <draw:line draw:style-name="gr5" draw:text-style-name="P4" draw:layer="layout" svg:x1="6.35cm" svg:y1="6.669cm" svg:x2="8.255cm" svg:y2="6.669cm">
            <text:p text:style-name="P6"/>
          </draw:line>
          <draw:line draw:style-name="gr5" draw:text-style-name="P4" draw:layer="layout" svg:x1="6.033cm" svg:y1="6.032cm" svg:x2="6.35cm" svg:y2="6.35cm">
            <text:p text:style-name="P6"/>
          </draw:line>
          <draw:line draw:style-name="gr5" draw:text-style-name="P4" draw:layer="layout" svg:x1="8.255cm" svg:y1="6.032cm" svg:x2="7.938cm" svg:y2="5.715cm">
            <text:p text:style-name="P6"/>
          </draw:line>
          <draw:line draw:style-name="gr5" draw:text-style-name="P4" draw:layer="layout" svg:x1="6.35cm" svg:y1="6.35cm" svg:x2="7.938cm" svg:y2="5.715cm">
            <text:p text:style-name="P6"/>
          </draw:line>
          <draw:connector draw:style-name="gr3" draw:text-style-name="P4" draw:layer="layout" svg:x1="9.525cm" svg:y1="6.668cm" svg:x2="9.208cm" svg:y2="8.893cm" draw:start-shape="id51" draw:start-glue-point="1" draw:end-shape="id27" draw:end-glue-point="0" svg:d="m9525 6668h500v1431h-817v794">
            <text:p text:style-name="P6"/>
          </draw:connector>
          <draw:line draw:style-name="gr5" draw:text-style-name="P4" draw:layer="layout" svg:x1="9.525cm" svg:y1="12.382cm" svg:x2="9.208cm" svg:y2="12.065cm">
            <text:p text:style-name="P6"/>
          </draw:line>
          <draw:line draw:style-name="gr5" draw:text-style-name="P4" draw:layer="layout" svg:x1="9.208cm" svg:y1="10.16cm" svg:x2="9.208cm" svg:y2="12.065cm">
            <text:p text:style-name="P6"/>
          </draw:line>
          <draw:frame draw:style-name="gr7" draw:layer="layout" svg:width="10.966cm" svg:height="1.007cm" svg:x="12.065cm" svg:y="0.952cm">
            <draw:text-box>
              <text:p text:style-name="P6">Bleeding Kansas (draft 1)</text:p>
            </draw:text-box>
          </draw:frame>
          <draw:frame draw:style-name="gr8" draw:text-style-name="P7" draw:layer="layout" svg:width="8.045cm" svg:height="0.504cm" svg:x="13.335cm" svg:y="1.905cm">
            <draw:text-box>
              <text:p text:style-name="P6"><text:span text:style-name="T3">(contradicted by 1857 Palmyra map)</text:span></text:p>
            </draw:text-box>
          </draw:frame>
        </draw:g>
      </draw:page>
      <draw:page draw:name="page2" draw:style-name="dp1" draw:master-page-name="Default">
        <office:forms form:automatic-focus="false" form:apply-design-mode="false"/>
        <draw:rect draw:style-name="gr1" draw:text-style-name="P2" draw:id="id60" draw:layer="layout" svg:width="1.27cm" svg:height="1.271cm" svg:x="33.02cm" svg:y="11.113cm">
          <text:p text:style-name="P1"><text:span text:style-name="T1">Trail</text:span></text:p>
        </draw:rect>
        <draw:rect draw:style-name="gr2" draw:text-style-name="P2" draw:id="id59" draw:layer="layout" svg:width="1.27cm" svg:height="1.271cm" svg:x="30.162cm" svg:y="11.114cm">
          <text:p text:style-name="P1"><text:span text:style-name="T1">Black </text:span></text:p>
          <text:p text:style-name="P1"><text:span text:style-name="T1">Jack</text:span></text:p>
        </draw:rect>
        <draw:rect draw:style-name="gr2" draw:text-style-name="P2" draw:id="id58" draw:layer="layout" svg:width="1.27cm" svg:height="1.271cm" svg:x="27.94cm" svg:y="11.112cm">
          <text:p text:style-name="P1"><text:span text:style-name="T1">Trail</text:span></text:p>
        </draw:rect>
        <draw:rect draw:style-name="gr2" draw:text-style-name="P2" draw:id="id61" draw:layer="layout" svg:width="1.27cm" svg:height="1.271cm" svg:x="25.718cm" svg:y="11.112cm">
          <text:p text:style-name="P1"><text:span text:style-name="T1">Trail</text:span></text:p>
        </draw:rect>
        <draw:rect draw:style-name="gr2" draw:text-style-name="P3" draw:id="id53" draw:layer="layout" svg:width="1.27cm" svg:height="1.271cm" svg:x="21.59cm" svg:y="11.113cm">
          <text:p text:style-name="P1"><text:span text:style-name="T2">Palmyra</text:span></text:p>
          <text:p text:style-name="P1"><text:span text:style-name="T2">East</text:span></text:p>
        </draw:rect>
        <draw:rect draw:style-name="gr2" draw:text-style-name="P3" draw:id="id52" draw:layer="layout" svg:width="1.27cm" svg:height="1.271cm" svg:x="19.685cm" svg:y="11.112cm">
          <text:p text:style-name="P1"><text:span text:style-name="T2">Palmyra</text:span></text:p>
        </draw:rect>
        <draw:rect draw:style-name="gr2" draw:text-style-name="P3" draw:id="id54" draw:layer="layout" svg:width="1.27cm" svg:height="1.271cm" svg:x="17.78cm" svg:y="11.112cm">
          <text:p text:style-name="P1"><text:span text:style-name="T2">Palmyra</text:span></text:p>
          <text:p text:style-name="P1"><text:span text:style-name="T2">West</text:span></text:p>
        </draw:rect>
        <draw:rect draw:style-name="gr2" draw:text-style-name="P3" draw:id="id55" draw:layer="layout" svg:width="1.27cm" svg:height="1.271cm" svg:x="19.685cm" svg:y="9.208cm">
          <text:p text:style-name="P1"><text:span text:style-name="T2">Palmyra</text:span></text:p>
          <text:p text:style-name="P1"><text:span text:style-name="T2">North</text:span></text:p>
        </draw:rect>
        <draw:rect draw:style-name="gr2" draw:text-style-name="P2" draw:id="id56" draw:layer="layout" svg:width="1.27cm" svg:height="1.271cm" svg:x="21.59cm" svg:y="9.208cm">
          <text:p text:style-name="P1"><text:span text:style-name="T1">Corral</text:span></text:p>
        </draw:rect>
        <draw:rect draw:style-name="gr2" draw:text-style-name="P2" draw:id="id64" draw:layer="layout" svg:width="1.27cm" svg:height="1.271cm" svg:x="17.78cm" svg:y="9.207cm">
          <text:p text:style-name="P1"><text:span text:style-name="T1">Porch</text:span></text:p>
        </draw:rect>
        <draw:connector draw:style-name="gr3" draw:text-style-name="P4" draw:layer="layout" svg:x1="20.955cm" svg:y1="11.747cm" svg:x2="21.59cm" svg:y2="11.748cm" draw:start-shape="id52" draw:start-glue-point="1" draw:end-shape="id53" draw:end-glue-point="3" svg:d="m20955 11747h318v1h317">
          <text:p text:style-name="P6"/>
        </draw:connector>
        <draw:connector draw:style-name="gr3" draw:text-style-name="P4" draw:layer="layout" svg:x1="19.05cm" svg:y1="11.747cm" svg:x2="19.685cm" svg:y2="11.747cm" draw:start-shape="id54" draw:start-glue-point="1" draw:end-shape="id52" draw:end-glue-point="3" svg:d="m19050 11747h635">
          <text:p text:style-name="P6"/>
        </draw:connector>
        <draw:connector draw:style-name="gr3" draw:text-style-name="P4" draw:layer="layout" svg:x1="20.32cm" svg:y1="11.112cm" svg:x2="20.32cm" svg:y2="10.479cm" draw:start-shape="id52" draw:start-glue-point="0" draw:end-shape="id55" draw:end-glue-point="2" svg:d="m20320 11112v-633">
          <text:p text:style-name="P6"/>
        </draw:connector>
        <draw:connector draw:style-name="gr3" draw:text-style-name="P4" draw:layer="layout" svg:x1="20.955cm" svg:y1="9.843cm" svg:x2="21.59cm" svg:y2="9.843cm" draw:start-shape="id55" draw:start-glue-point="1" draw:end-shape="id56" draw:end-glue-point="3" svg:d="m20955 9843h635">
          <text:p text:style-name="P6"/>
        </draw:connector>
        <draw:connector draw:style-name="gr3" draw:text-style-name="P4" draw:layer="layout" svg:x1="22.225cm" svg:y1="10.479cm" svg:x2="22.225cm" svg:y2="11.113cm" draw:start-shape="id56" draw:start-glue-point="2" draw:end-shape="id53" draw:end-glue-point="0" svg:d="m22225 10479v634">
          <text:p text:style-name="P6"/>
        </draw:connector>
        <draw:rect draw:style-name="gr2" draw:text-style-name="P2" draw:id="id57" draw:layer="layout" svg:width="1.27cm" svg:height="1.271cm" svg:x="19.685cm" svg:y="5.396cm">
          <text:p text:style-name="P1"><text:span text:style-name="T1">Farm</text:span></text:p>
          <text:p text:style-name="P1"><text:span text:style-name="T1">Land</text:span></text:p>
        </draw:rect>
        <draw:connector draw:style-name="gr3" draw:text-style-name="P4" draw:layer="layout" svg:x1="20.32cm" svg:y1="6.667cm" svg:x2="20.32cm" svg:y2="9.208cm" draw:start-shape="id57" draw:start-glue-point="2" draw:end-shape="id55" draw:end-glue-point="0" svg:d="m20320 6667v2541">
          <text:p text:style-name="P6"/>
        </draw:connector>
        <draw:rect draw:style-name="gr2" draw:text-style-name="P2" draw:id="id62" draw:layer="layout" svg:width="1.27cm" svg:height="1.271cm" svg:x="23.495cm" svg:y="11.113cm">
          <text:p text:style-name="P1"><text:span text:style-name="T1">Trail</text:span></text:p>
        </draw:rect>
        <draw:rect draw:style-name="gr4" draw:text-style-name="P2" draw:id="id67" draw:layer="layout" svg:width="1.27cm" svg:height="1.271cm" svg:x="30.162cm" svg:y="9.526cm">
          <text:p text:style-name="P1"><text:span text:style-name="T1">House</text:span></text:p>
        </draw:rect>
        <draw:rect draw:style-name="gr4" draw:text-style-name="P2" draw:layer="layout" svg:width="1.27cm" svg:height="1.271cm" svg:x="31.75cm" svg:y="9.525cm">
          <text:p text:style-name="P1"><text:span text:style-name="T1">House</text:span></text:p>
        </draw:rect>
        <draw:rect draw:style-name="gr4" draw:text-style-name="P2" draw:layer="layout" svg:width="1.27cm" svg:height="1.271cm" svg:x="31.75cm" svg:y="12.7cm">
          <text:p text:style-name="P1"><text:span text:style-name="T1">House</text:span></text:p>
        </draw:rect>
        <draw:connector draw:style-name="gr3" draw:text-style-name="P4" draw:layer="layout" svg:x1="29.21cm" svg:y1="11.747cm" svg:x2="30.162cm" svg:y2="11.749cm" draw:start-shape="id58" draw:start-glue-point="1" draw:end-shape="id59" draw:end-glue-point="3" svg:d="m29210 11747h476v2h476">
          <text:p text:style-name="P6"/>
        </draw:connector>
        <draw:connector draw:style-name="gr3" draw:text-style-name="P4" draw:layer="layout" svg:x1="31.432cm" svg:y1="11.749cm" svg:x2="33.02cm" svg:y2="11.748cm" draw:start-shape="id59" draw:start-glue-point="1" draw:end-shape="id60" draw:end-glue-point="3" svg:d="m31432 11749h769v-1h819">
          <text:p text:style-name="P6"/>
        </draw:connector>
        <draw:connector draw:style-name="gr3" draw:text-style-name="P4" draw:layer="layout" svg:x1="27.94cm" svg:y1="11.747cm" svg:x2="26.988cm" svg:y2="11.747cm" draw:start-shape="id58" draw:start-glue-point="3" draw:end-shape="id61" draw:end-glue-point="1" svg:d="m27940 11747h-952">
          <text:p text:style-name="P6"/>
        </draw:connector>
        <draw:connector draw:style-name="gr3" draw:text-style-name="P4" draw:layer="layout" svg:x1="24.765cm" svg:y1="11.748cm" svg:x2="25.718cm" svg:y2="11.747cm" draw:start-shape="id62" draw:start-glue-point="1" draw:end-shape="id61" draw:end-glue-point="3" svg:d="m24765 11748h477v-1h476">
          <text:p text:style-name="P6"/>
        </draw:connector>
        <draw:connector draw:style-name="gr3" draw:text-style-name="P4" draw:layer="layout" svg:x1="22.86cm" svg:y1="11.748cm" svg:x2="23.495cm" svg:y2="11.748cm" draw:start-shape="id53" draw:start-glue-point="1" draw:end-shape="id62" draw:end-glue-point="3" svg:d="m22860 11748h635">
          <text:p text:style-name="P6"/>
        </draw:connector>
        <draw:rect draw:style-name="gr4" draw:text-style-name="P2" draw:layer="layout" svg:width="1.27cm" svg:height="1.271cm" svg:x="21.59cm" svg:y="7.303cm">
          <text:p text:style-name="P1"><text:span text:style-name="T1">House</text:span></text:p>
        </draw:rect>
        <draw:rect draw:style-name="gr2" draw:text-style-name="P2" draw:id="id63" draw:layer="layout" svg:width="1.27cm" svg:height="1.271cm" svg:x="14.923cm" svg:y="11.112cm">
          <text:p text:style-name="P1"><text:span text:style-name="T1">Trail</text:span></text:p>
        </draw:rect>
        <draw:connector draw:style-name="gr3" draw:text-style-name="P4" draw:layer="layout" svg:x1="16.193cm" svg:y1="11.747cm" svg:x2="17.78cm" svg:y2="11.747cm" draw:start-shape="id63" draw:start-glue-point="1" draw:end-shape="id54" draw:end-glue-point="3" svg:d="m16193 11747h1587">
          <text:p text:style-name="P6"/>
        </draw:connector>
        <draw:rect draw:style-name="gr1" draw:text-style-name="P5" draw:id="id66" draw:layer="layout" svg:width="2.54cm" svg:height="1.271cm" svg:x="19.05cm" svg:y="3.175cm">
          <text:p text:style-name="P1"><text:span text:style-name="T3">Prairie</text:span></text:p>
        </draw:rect>
        <draw:line draw:style-name="gr5" draw:text-style-name="P4" draw:layer="layout" svg:x1="20.955cm" svg:y1="9.207cm" svg:x2="21.273cm" svg:y2="8.89cm">
          <text:p text:style-name="P6"/>
        </draw:line>
        <draw:line draw:style-name="gr5" draw:text-style-name="P4" draw:layer="layout" svg:x1="20.955cm" svg:y1="6.667cm" svg:x2="21.59cm" svg:y2="7.302cm">
          <text:p text:style-name="P6"/>
        </draw:line>
        <draw:rect draw:style-name="gr4" draw:text-style-name="P2" draw:id="id65" draw:layer="layout" svg:width="1.27cm" svg:height="1.271cm" svg:x="15.875cm" svg:y="9.206cm">
          <text:p text:style-name="P1"><text:span text:style-name="T1">House</text:span></text:p>
        </draw:rect>
        <draw:rect draw:style-name="gr4" draw:text-style-name="P2" draw:layer="layout" svg:width="1.27cm" svg:height="1.271cm" svg:x="15.875cm" svg:y="6.35cm">
          <text:p text:style-name="P1"><text:span text:style-name="T1">Upstairs</text:span></text:p>
        </draw:rect>
        <draw:connector draw:style-name="gr3" draw:text-style-name="P4" draw:layer="layout" svg:x1="19.05cm" svg:y1="9.842cm" svg:x2="19.685cm" svg:y2="9.843cm" draw:start-shape="id64" draw:start-glue-point="1" draw:end-shape="id55" draw:end-glue-point="3" svg:d="m19050 9842h318v1h317">
          <text:p text:style-name="P6"/>
        </draw:connector>
        <draw:connector draw:style-name="gr3" draw:text-style-name="P4" draw:layer="layout" svg:x1="17.78cm" svg:y1="9.842cm" svg:x2="17.145cm" svg:y2="9.841cm" draw:start-shape="id64" draw:start-glue-point="3" draw:end-shape="id65" draw:end-glue-point="1" svg:d="m17780 9842h-317v-1h-318">
          <text:p text:style-name="P6"/>
        </draw:connector>
        <draw:line draw:style-name="gr5" draw:text-style-name="P4" draw:layer="layout" svg:x1="24.13cm" svg:y1="6.985cm" svg:x2="21.59cm" svg:y2="4.445cm">
          <text:p text:style-name="P6"/>
        </draw:line>
        <draw:connector draw:style-name="gr3" draw:text-style-name="P4" draw:layer="layout" svg:x1="20.32cm" svg:y1="5.396cm" svg:x2="20.32cm" svg:y2="4.446cm" draw:start-shape="id57" draw:start-glue-point="0" draw:end-shape="id66" draw:end-glue-point="2" svg:d="m20320 5396v-950">
          <text:p text:style-name="P6"/>
        </draw:connector>
        <draw:line draw:style-name="gr5" draw:text-style-name="P4" draw:layer="layout" svg:x1="21.273cm" svg:y1="8.89cm" svg:x2="21.273cm" svg:y2="7.937cm">
          <text:p text:style-name="P6"/>
        </draw:line>
        <draw:line draw:style-name="gr5" draw:text-style-name="P4" draw:layer="layout" svg:x1="21.273cm" svg:y1="7.937cm" svg:x2="21.59cm" svg:y2="7.937cm">
          <text:p text:style-name="P6"/>
        </draw:line>
        <draw:line draw:style-name="gr5" draw:text-style-name="P4" draw:layer="layout" svg:x1="19.685cm" svg:y1="6.667cm" svg:x2="17.78cm" svg:y2="8.255cm">
          <text:p text:style-name="P6"/>
        </draw:line>
        <draw:line draw:style-name="gr5" draw:text-style-name="P4" draw:layer="layout" svg:x1="16.51cm" svg:y1="9.207cm" svg:x2="16.51cm" svg:y2="8.255cm">
          <text:p text:style-name="P6"/>
        </draw:line>
        <draw:line draw:style-name="gr5" draw:text-style-name="P4" draw:layer="layout" svg:x1="16.51cm" svg:y1="8.255cm" svg:x2="17.78cm" svg:y2="8.255cm">
          <text:p text:style-name="P6"/>
        </draw:line>
        <draw:line draw:style-name="gr6" draw:text-style-name="P4" draw:layer="layout" svg:x1="16.193cm" svg:y1="9.207cm" svg:x2="16.193cm" svg:y2="7.62cm">
          <text:p text:style-name="P6"/>
        </draw:line>
        <draw:line draw:style-name="gr5" draw:text-style-name="P4" draw:layer="layout" svg:x1="19.05cm" svg:y1="4.445cm" svg:x2="17.463cm" svg:y2="5.715cm">
          <text:p text:style-name="P6"/>
        </draw:line>
        <draw:line draw:style-name="gr5" draw:text-style-name="P4" draw:layer="layout" svg:x1="17.463cm" svg:y1="5.715cm" svg:x2="15.558cm" svg:y2="5.715cm">
          <text:p text:style-name="P6"/>
        </draw:line>
        <draw:line draw:style-name="gr5" draw:text-style-name="P4" draw:layer="layout" svg:x1="15.558cm" svg:y1="11.112cm" svg:x2="15.558cm" svg:y2="5.715cm">
          <text:p text:style-name="P6"/>
        </draw:line>
        <draw:line draw:style-name="gr5" draw:text-style-name="P4" draw:layer="layout" svg:x1="24.13cm" svg:y1="11.112cm" svg:x2="24.13cm" svg:y2="6.985cm">
          <text:p text:style-name="P6"/>
        </draw:line>
        <draw:connector draw:style-name="gr3" draw:text-style-name="P4" draw:layer="layout" svg:x1="30.797cm" svg:y1="11.114cm" svg:x2="30.797cm" svg:y2="10.797cm" draw:start-shape="id59" draw:start-glue-point="0" draw:end-shape="id67" draw:end-glue-point="2" svg:d="m30797 11114v-317">
          <text:p text:style-name="P6"/>
        </draw:connector>
        <draw:line draw:style-name="gr5" draw:text-style-name="P4" draw:layer="layout" svg:x1="31.432cm" svg:y1="11.113cm" svg:x2="31.75cm" svg:y2="10.796cm">
          <text:p text:style-name="P6"/>
        </draw:line>
        <draw:line draw:style-name="gr5" draw:text-style-name="P4" draw:layer="layout" svg:x1="31.432cm" svg:y1="12.383cm" svg:x2="31.75cm" svg:y2="12.701cm">
          <text:p text:style-name="P6"/>
        </draw:line>
        <draw:rect draw:style-name="gr1" draw:text-style-name="P5" draw:id="id68" draw:layer="layout" svg:width="2.54cm" svg:height="1.271cm" svg:x="28.893cm" svg:y="3.175cm">
          <text:p text:style-name="P1"><text:span text:style-name="T3">Prairie</text:span></text:p>
        </draw:rect>
        <draw:connector draw:style-name="gr3" draw:text-style-name="P4" draw:layer="layout" svg:x1="28.893cm" svg:y1="3.81cm" svg:x2="21.59cm" svg:y2="3.81cm" draw:start-shape="id68" draw:start-glue-point="3" draw:end-shape="id66" draw:end-glue-point="1" svg:d="m28893 3810h-7303">
          <text:p text:style-name="P6"/>
        </draw:connector>
        <draw:connector draw:style-name="gr3" draw:text-style-name="P4" draw:layer="layout" svg:x1="30.163cm" svg:y1="4.446cm" svg:x2="28.575cm" svg:y2="11.112cm" draw:start-shape="id68" draw:start-glue-point="2" draw:end-shape="id58" draw:end-glue-point="0" svg:d="m30163 4446v3359h-1588v3307">
          <text:p text:style-name="P6"/>
        </draw:connector>
        <draw:line draw:style-name="gr5" draw:text-style-name="P4" draw:layer="layout" svg:x1="31.433cm" svg:y1="4.445cm" svg:x2="33.655cm" svg:y2="6.667cm">
          <text:p text:style-name="P6"/>
        </draw:line>
        <draw:line draw:style-name="gr5" draw:text-style-name="P4" draw:layer="layout" svg:x1="33.655cm" svg:y1="6.667cm" svg:x2="33.655cm" svg:y2="11.112cm">
          <text:p text:style-name="P6"/>
        </draw:line>
        <draw:line draw:style-name="gr5" draw:text-style-name="P4" draw:layer="layout" svg:x1="26.353cm" svg:y1="11.112cm" svg:x2="26.353cm" svg:y2="7.302cm">
          <text:p text:style-name="P6"/>
        </draw:line>
        <draw:line draw:style-name="gr5" draw:text-style-name="P4" draw:layer="layout" svg:x1="28.893cm" svg:y1="4.445cm" svg:x2="26.353cm" svg:y2="7.302cm">
          <text:p text:style-name="P6"/>
        </draw:line>
        <draw:frame draw:style-name="gr9" draw:layer="layout" svg:width="12.778cm" svg:height="1.007cm" svg:x="12.065cm" svg:y="1.587cm">
          <draw:text-box>
            <text:p text:style-name="P6">When Kansas Bleeds (draft 2)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10" draw:text-style-name="P6" draw:layer="layout" svg:width="12.846cm" svg:height="1.007cm" svg:x="11.284cm" svg:y="1.27cm">
          <draw:text-box>
            <text:p text:style-name="P6">When Kansas Bleeds (outline)</text:p>
          </draw:text-box>
        </draw:frame>
        <draw:custom-shape draw:style-name="gr11" draw:text-style-name="P8" draw:layer="layout" svg:width="3.492cm" svg:height="1.905cm" svg:x="5.715cm" svg:y="3.493cm">
          <text:p text:style-name="P1"><text:span text:style-name="T4">Pottawatomie</text:span></text:p>
          <text:p text:style-name="P1"><text:span text:style-name="T4">Creek</text:span></text:p>
          <text:p text:style-name="P1"><text:span text:style-name="T4">5/24/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.175cm" svg:height="2.223cm" svg:x="1.27cm" svg:y="3.175cm">
          <text:p text:style-name="P1"><text:span text:style-name="T4">Foreword</text:span></text:p>
          <text:p text:style-name="P1"><text:span text:style-name="T4">2008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1" draw:text-style-name="P8" draw:layer="layout" svg:width="3.492cm" svg:height="1.905cm" svg:x="10.795cm" svg:y="3.493cm">
          <text:p text:style-name="P1"><text:span text:style-name="T4">Governor's</text:span></text:p>
          <text:p text:style-name="P1"><text:span text:style-name="T4">Office</text:span></text:p>
          <text:p text:style-name="P1"><text:span text:style-name="T4">5/27/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0.952cm" svg:height="0.953cm" svg:x="4.445cm" svg:y="3.811cm">
          <text:p text:style-name="P6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8" draw:layer="layout" svg:width="0.952cm" svg:height="0.953cm" svg:x="9.525cm" svg:y="3.811cm">
          <text:p text:style-name="P6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3.492cm" svg:height="1.905cm" svg:x="15.875cm" svg:y="3.493cm">
          <text:p text:style-name="P1"><text:span text:style-name="T4">Manhunt</text:span></text:p>
          <text:p text:style-name="P1"><text:span text:style-name="T4">5/30/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0.952cm" svg:height="0.953cm" svg:x="14.605cm" svg:y="3.811cm">
          <text:p text:style-name="P6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3.492cm" svg:height="1.905cm" svg:x="10.478cm" svg:y="7.937cm">
          <text:p text:style-name="P1"><text:span text:style-name="T4">John Br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3.492cm" svg:height="1.905cm" svg:x="15.875cm" svg:y="8.255cm">
          <text:p text:style-name="P1"><text:span text:style-name="T4">Lovejo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3.492cm" svg:height="1.905cm" svg:x="26.353cm" svg:y="7.937cm">
          <text:p text:style-name="P1"><text:span text:style-name="T4">P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3.492cm" svg:height="1.905cm" svg:x="20.003cm" svg:y="8.572cm">
          <text:p text:style-name="P1"><text:span text:style-name="T4">St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3.492cm" svg:height="1.905cm" svg:x="10.16cm" svg:y="16.51cm">
          <text:p text:style-name="P1"><text:span text:style-name="T4">Black Jack</text:span></text:p>
          <text:p text:style-name="P1"><text:span text:style-name="T4">(with Brown)</text:span></text:p>
          <text:p text:style-name="P1"><text:span text:style-name="T4">6/1/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3.492cm" svg:height="1.905cm" svg:x="20.32cm" svg:y="16.51cm">
          <text:p text:style-name="P1"><text:span text:style-name="T4">Black Jack</text:span></text:p>
          <text:p text:style-name="P1"><text:span text:style-name="T4">(with Pate)</text:span></text:p>
          <text:p text:style-name="P1"><text:span text:style-name="T4">6/1/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3.492cm" svg:height="1.905cm" svg:x="15.557cm" svg:y="13.017cm">
          <text:p text:style-name="P1"><text:span text:style-name="T4">Circuit Church</text:span></text:p>
          <text:p text:style-name="P1"><text:span text:style-name="T4">5/31/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3.492cm" svg:height="1.905cm" svg:x="14.923cm" svg:y="16.51cm">
          <text:p text:style-name="P1"><text:span text:style-name="T4">Black Jack</text:span></text:p>
          <text:p text:style-name="P1"><text:span text:style-name="T4">(from outside)</text:span></text:p>
          <text:p text:style-name="P1"><text:span text:style-name="T4">6/1/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35.56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usan Davis</meta:initial-creator>
    <meta:creation-date>2004-01-08T22:31:15</meta:creation-date>
    <dc:creator>Susan Davis</dc:creator>
    <dc:date>2008-09-08T04:03:17</dc:date>
    <dc:language>en-US</dc:language>
    <meta:editing-cycles>17</meta:editing-cycles>
    <meta:editing-duration>P7DT7H54M4S</meta:editing-duration>
    <meta:user-defined meta:name="Info 1"/>
    <meta:user-defined meta:name="Info 2"/>
    <meta:user-defined meta:name="Info 3"/>
    <meta:user-defined meta:name="Info 4"/>
    <meta:document-statistic meta:object-count="265"/>
  </office:meta>
</office:document-meta>
</file>